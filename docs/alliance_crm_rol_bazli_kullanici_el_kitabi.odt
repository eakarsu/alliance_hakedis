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925in" fo:margin-top="0in" fo:margin-bottom="0in" table:align="center" style:writing-mode="page"/>
    </style:style>
    <style:style style:name="Table1.A" style:family="table-column">
      <style:table-column-properties style:column-width="6.9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4ff" fo:padding-left="0.1111in" fo:padding-right="0.1111in" fo:padding-top="0.0903in" fo:padding-bottom="0.0903in" fo:border="none">
        <style:background-image/>
      </style:table-cell-properties>
    </style:style>
    <style:style style:name="Table2" style:family="table">
      <style:table-properties style:width="6.925in" fo:margin-top="0in" fo:margin-bottom="0in" table:align="center" style:writing-mode="lr-tb"/>
    </style:style>
    <style:style style:name="Table2.A" style:family="table-column">
      <style:table-column-properties style:column-width="1.731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cebff" fo:padding-left="0.0833in" fo:padding-right="0.0833in" fo:padding-top="0.0694in" fo:padding-bottom="0.0694in" fo:border="0.5pt solid #000000" style:writing-mode="lr-tb">
        <style:background-image/>
      </style:table-cell-properties>
    </style:style>
    <style:style style:name="Table2.A2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2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2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2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3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3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3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3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4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4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4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4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5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5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5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5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6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6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6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6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7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7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7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7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8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8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8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8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A9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B9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C9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2.D9" style:family="table-cell">
      <style:table-cell-properties fo:padding-left="0.0764in" fo:padding-right="0.0764in" fo:padding-top="0.0625in" fo:padding-bottom="0.0625in" fo:border="0.5pt solid #000000" style:writing-mode="lr-tb"/>
    </style:style>
    <style:style style:name="Table3" style:family="table">
      <style:table-properties style:width="6.9271in" fo:margin-top="0in" fo:margin-bottom="0in" table:align="center" style:writing-mode="lr-tb"/>
    </style:style>
    <style:style style:name="Table3.A" style:family="table-column">
      <style:table-column-properties style:column-width="0.9896in"/>
    </style:style>
    <style:style style:name="Table3.B" style:family="table-column">
      <style:table-column-properties style:column-width="0.9889in"/>
    </style:style>
    <style:style style:name="Table3.C" style:family="table-column">
      <style:table-column-properties style:column-width="0.990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8f0fe" fo:padding="0.0625in" fo:border="0.5pt solid #000000" style:writing-mode="lr-tb">
        <style:background-image/>
      </style:table-cell-properties>
    </style:style>
    <style:style style:name="Table3.A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2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A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3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A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4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A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5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A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6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A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7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A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B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C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D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E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F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Table3.G8" style:family="table-cell">
      <style:table-cell-properties fo:padding-left="0.0625in" fo:padding-right="0.0625in" fo:padding-top="0.0556in" fo:padding-bottom="0.0556in" fo:border="0.5pt solid #000000" style:writing-mode="lr-tb"/>
    </style:style>
    <style:style style:name="P1" style:family="paragraph" style:parent-style-name="TitleAccent">
      <style:paragraph-properties fo:text-align="center" style:justify-single-word="false"/>
    </style:style>
    <style:style style:name="P2" style:family="paragraph" style:parent-style-name="Subtl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margin-top="0in" fo:margin-bottom="0.0555in" style:contextual-spacing="false" fo:break-before="page"/>
    </style:style>
    <style:style style:name="P5" style:family="paragraph" style:parent-style-name="List_20_1" style:list-style-name="WWNum1"/>
    <style:style style:name="P6" style:family="paragraph" style:parent-style-name="Numbering_20_1" style:list-style-name="WWNum5"/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475569" loext:opacity="100%" fo:font-size="10pt" style:font-size-asian="10pt"/>
    </style:style>
    <style:style style:name="T2" style:family="text">
      <style:text-properties fo:color="#1e293b" loext:opacity="100%" fo:font-size="10.5pt" style:font-size-asian="10.5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iance CRM MVP<text:line-break/>Rol Bazlı Kullanıcı El Kitabı</text:p>
      <text:p text:style-name="P2">Çekirdek ekip, partnerler ve delivery tarafı için kullanım, yetki ve operasyon kılavuzu</text:p>
      <text:p text:style-name="P3"><text:span text:style-name="T1"><text:line-break/>Hazırlayan: ChatGPT taslak dokümanı<text:line-break/>Amaç: Erol tarafından geliştirilen MVP ürünün rol bazlı kullanımını netleştirmek</text:span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2">Temel ilke: Bu sistemde herkes aynı veriyi, aynı derinlikte ve aynı amaçla kullanmaz. Aynı kişi farklı fırsatlarda farklı rollerde olabilir. Bu nedenle hem ana profil rolü hem de fırsat / proje bazlı rol birlikte yönetilmelidir.</text:span></text:p>
          </table:table-cell>
        </table:table-row>
      </table:table>
      <text:p text:style-name="Standard"/>
      <text:h text:style-name="P4" text:outline-level="1">1. Dokümanın amacı</text:h>
      <text:p text:style-name="Standard">Bu doküman, alliance yapısına göre tasarlanan CRM MVP ürününde kullanıcı rollerini, sorumluluklarını, ekranlarını, yetki seviyelerini ve tipik kullanım akışlarını tanımlar.</text:p>
      <text:p text:style-name="Standard">Hedef, çekirdek ekip içinde rol karmaşasını azaltmak, sistem kullanımını standartlaştırmak ve her opportunity üzerinde kimin ne yaptığını açık hale getirmektir.</text:p>
      <text:p text:style-name="Standard">Bu doküman nihai hukuk veya şirket organigramı değildir; operasyonel kullanım ve ürün tasarımı için çalışma kılavuzudur.</text:p>
      <text:h text:style-name="Heading_20_1" text:outline-level="1">2. Ana prensipler</text:h>
      <text:list xml:id="list984166292" text:style-name="WWNum1">
        <text:list-item>
          <text:p text:style-name="P5">Aynı kişi her fırsatta aynı rolde olmak zorunda değildir.</text:p>
        </text:list-item>
        <text:list-item>
          <text:p text:style-name="P5">Sistemde görünürlük rol bazlıdır; herkes her kaydı görmez.</text:p>
        </text:list-item>
        <text:list-item>
          <text:p text:style-name="P5">Her fırsatta en az şu roller net olmalıdır: source owner, sponsor, deal owner, technical partner, product owner, delivery owner.</text:p>
        </text:list-item>
        <text:list-item>
          <text:p text:style-name="P5">Community mantığı değil, kontrollü görünürlük ve kayıtlı katkı mantığı geçerlidir.</text:p>
        </text:list-item>
        <text:list-item>
          <text:p text:style-name="P5">Bir kaydın gerçek sahibi ile bir kaydı görebilen kişi aynı olmak zorunda değildir.</text:p>
        </text:list-item>
      </text:list>
      <text:h text:style-name="Heading_20_1" text:outline-level="1">3. Rol yapısı: iki seviye</text:h>
      <text:p text:style-name="Standard">Sistemde roller iki seviyede düşünülmelidir:</text:p>
      <text:list xml:id="list596741546" text:style-name="WWNum5">
        <text:list-item>
          <text:p text:style-name="P6">Kalıcı / ana profil rolü: kişinin alliance içindeki genel kimliği.</text:p>
        </text:list-item>
        <text:list-item>
          <text:p text:style-name="P6">Fırsat / proje bazlı rol: belirli bir lead, opportunity veya project içindeki görevi.</text:p>
        </text:list-item>
      </text:list>
      <text:h text:style-name="Heading_20_1" text:outline-level="1">4. Kişi–rol eşleştirme özeti</text:h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7"><text:span text:style-name="T3">Kişi</text:span></text:p>
          </table:table-cell>
          <table:table-cell table:style-name="Table2.A1" office:value-type="string">
            <text:p text:style-name="P7"><text:span text:style-name="T3">Ana Rol</text:span></text:p>
          </table:table-cell>
          <table:table-cell table:style-name="Table2.A1" office:value-type="string">
            <text:p text:style-name="P7"><text:span text:style-name="T3">İkincil Roller</text:span></text:p>
          </table:table-cell>
          <table:table-cell table:style-name="Table2.A1" office:value-type="string">
            <text:p text:style-name="P7"><text:span text:style-name="T3">Not</text:span></text:p>
          </table:table-cell>
        </table:table-row>
        <table:table-row table:style-name="Table2.1">
          <table:table-cell table:style-name="Table2.A2" office:value-type="string">
            <text:p text:style-name="P7">Fetih</text:p>
          </table:table-cell>
          <table:table-cell table:style-name="Table2.B2" office:value-type="string">
            <text:p text:style-name="P7">Founding Orchestrator / Core Governance</text:p>
          </table:table-cell>
          <table:table-cell table:style-name="Table2.C2" office:value-type="string">
            <text:p text:style-name="P7">Strategy, Opportunity Architect, Relationship Owner</text:p>
          </table:table-cell>
          <table:table-cell table:style-name="Table2.D2" office:value-type="string">
            <text:p text:style-name="P7">Yapıyı kurar, eşleşmeleri ve güven mekanizmasını taşır.</text:p>
          </table:table-cell>
        </table:table-row>
        <table:table-row table:style-name="Table2.1">
          <table:table-cell table:style-name="Table2.A3" office:value-type="string">
            <text:p text:style-name="P7">Muhittin</text:p>
          </table:table-cell>
          <table:table-cell table:style-name="Table2.B3" office:value-type="string">
            <text:p text:style-name="P7">PMO / Alliance Coordination</text:p>
          </table:table-cell>
          <table:table-cell table:style-name="Table2.C3" office:value-type="string">
            <text:p text:style-name="P7">Partner development, investor/channel relations</text:p>
          </table:table-cell>
          <table:table-cell table:style-name="Table2.D3" office:value-type="string">
            <text:p text:style-name="P7">Takip, koordinasyon, ticari ilerleme ve delivery disiplini.</text:p>
          </table:table-cell>
        </table:table-row>
        <table:table-row table:style-name="Table2.1">
          <table:table-cell table:style-name="Table2.A4" office:value-type="string">
            <text:p text:style-name="P7">Erol</text:p>
          </table:table-cell>
          <table:table-cell table:style-name="Table2.B4" office:value-type="string">
            <text:p text:style-name="P7">Chief Solution Architect</text:p>
          </table:table-cell>
          <table:table-cell table:style-name="Table2.C4" office:value-type="string">
            <text:p text:style-name="P7">Integration Lead, CRM technical owner</text:p>
          </table:table-cell>
          <table:table-cell table:style-name="Table2.D4" office:value-type="string">
            <text:p text:style-name="P7">Teknik fizibilite, entegrasyon ve delivery backbone.</text:p>
          </table:table-cell>
        </table:table-row>
        <table:table-row table:style-name="Table2.1">
          <table:table-cell table:style-name="Table2.A5" office:value-type="string">
            <text:p text:style-name="P7">Gökhan</text:p>
          </table:table-cell>
          <table:table-cell table:style-name="Table2.B5" office:value-type="string">
            <text:p text:style-name="P7">Enterprise Solution Partner</text:p>
          </table:table-cell>
          <table:table-cell table:style-name="Table2.C5" office:value-type="string">
            <text:p text:style-name="P7">Channel bridge, white-label/reseller enabler</text:p>
          </table:table-cell>
          <table:table-cell table:style-name="Table2.D5" office:value-type="string">
            <text:p text:style-name="P7">Ürün, kanal ve enterprise güven katmanı.</text:p>
          </table:table-cell>
        </table:table-row>
        <table:table-row table:style-name="Table2.1">
          <table:table-cell table:style-name="Table2.A6" office:value-type="string">
            <text:p text:style-name="P7">Yasin</text:p>
          </table:table-cell>
          <table:table-cell table:style-name="Table2.B6" office:value-type="string">
            <text:p text:style-name="P7">Product Experience Lead</text:p>
          </table:table-cell>
          <table:table-cell table:style-name="Table2.C6" office:value-type="string">
            <text:p text:style-name="P7">Chatbot/site conversion owner</text:p>
          </table:table-cell>
          <table:table-cell table:style-name="Table2.D6" office:value-type="string">
            <text:p text:style-name="P7">Demo kalitesi, UI/UX ve ürün yüzü.</text:p>
          </table:table-cell>
        </table:table-row>
        <table:table-row table:style-name="Table2.1">
          <table:table-cell table:style-name="Table2.A7" office:value-type="string">
            <text:p text:style-name="P7">İbrahim</text:p>
          </table:table-cell>
          <table:table-cell table:style-name="Table2.B7" office:value-type="string">
            <text:p text:style-name="P7">Flagship Product Partner</text:p>
          </table:table-cell>
          <table:table-cell table:style-name="Table2.C7" office:value-type="string">
            <text:p text:style-name="P7">Regional / vertical licensing</text:p>
          </table:table-cell>
          <table:table-cell table:style-name="Table2.D7" office:value-type="string">
            <text:p text:style-name="P7">Somut ürün, lisanslama ve ürün yönü.</text:p>
          </table:table-cell>
        </table:table-row>
        <table:table-row table:style-name="Table2.1">
          <table:table-cell table:style-name="Table2.A8" office:value-type="string">
            <text:p text:style-name="P7">Michael</text:p>
          </table:table-cell>
          <table:table-cell table:style-name="Table2.B8" office:value-type="string">
            <text:p text:style-name="P7">US Market Bridge</text:p>
          </table:table-cell>
          <table:table-cell table:style-name="Table2.C8" office:value-type="string">
            <text:p text:style-name="P7">Consulting delivery, opportunity partner</text:p>
          </table:table-cell>
          <table:table-cell table:style-name="Table2.D8" office:value-type="string">
            <text:p text:style-name="P7">ABD pazar açılımı ve danışmanlık katkısı.</text:p>
          </table:table-cell>
        </table:table-row>
        <text:soft-page-break/>
        <table:table-row table:style-name="Table2.1">
          <table:table-cell table:style-name="Table2.A9" office:value-type="string">
            <text:p text:style-name="P7">Archie</text:p>
          </table:table-cell>
          <table:table-cell table:style-name="Table2.B9" office:value-type="string">
            <text:p text:style-name="P7">Restricted External Contact</text:p>
          </table:table-cell>
          <table:table-cell table:style-name="Table2.C9" office:value-type="string">
            <text:p text:style-name="P7">Referral / project-specific contact</text:p>
          </table:table-cell>
          <table:table-cell table:style-name="Table2.D9" office:value-type="string">
            <text:p text:style-name="P7">Sınırlı görünürlükle, kontrollü ticari temas.</text:p>
          </table:table-cell>
        </table:table-row>
      </table:table>
      <text:h text:style-name="Heading_20_1" text:outline-level="1">5. Rol 1 – Founding Orchestrator / Core Governance</text:h>
      <text:p text:style-name="Subtle">Kim için: Fetih ve gerektiğinde çekirdek yönetişim halkası</text:p>
      <text:h text:style-name="Heading_20_2" text:outline-level="2">Amaç</text:h>
      <text:p text:style-name="Standard">Sistemin bütününü görmek, fırsatlar arasındaki ilişkiyi yönetmek ve alliance düzenini korumak.</text:p>
      <text:h text:style-name="Heading_20_2" text:outline-level="2">Temel sorumluluklar</text:h>
      <text:list text:continue-list="list984166292" text:style-name="WWNum1">
        <text:list-item>
          <text:p text:style-name="P5">Conflict çözümü ve escalation yönetimi</text:p>
        </text:list-item>
        <text:list-item>
          <text:p text:style-name="P5">Lead ownership ve visibility kararları</text:p>
        </text:list-item>
        <text:list-item>
          <text:p text:style-name="P5">Yeni partner veya restricted kullanıcı kabulü</text:p>
        </text:list-item>
        <text:list-item>
          <text:p text:style-name="P5">Ortak marka, ana site ve operating rules kararları</text:p>
        </text:list-item>
        <text:list-item>
          <text:p text:style-name="P5">Ekonomik paylaşım çerçevesi ve ops pool mantığı</text:p>
        </text:list-item>
      </text:list>
      <text:h text:style-name="Heading_20_2" text:outline-level="2">Kullandığı ana ekranlar</text:h>
      <text:list text:continue-numbering="true" text:style-name="WWNum1">
        <text:list-item>
          <text:p text:style-name="P5">Governance Dashboard</text:p>
        </text:list-item>
        <text:list-item>
          <text:p text:style-name="P5">All Opportunities View</text:p>
        </text:list-item>
        <text:list-item>
          <text:p text:style-name="P5">Conflict Queue</text:p>
        </text:list-item>
        <text:list-item>
          <text:p text:style-name="P5">Visibility Approval Queue</text:p>
        </text:list-item>
        <text:list-item>
          <text:p text:style-name="P5">Agreement Registry</text:p>
        </text:list-item>
        <text:list-item>
          <text:p text:style-name="P5">Risk &amp; Compliance View</text:p>
        </text:list-item>
      </text:list>
      <text:h text:style-name="Heading_20_2" text:outline-level="2">Görebildiği ana veri</text:h>
      <text:list text:continue-numbering="true" text:style-name="WWNum1">
        <text:list-item>
          <text:p text:style-name="P5">Çoğu opportunity özeti</text:p>
        </text:list-item>
        <text:list-item>
          <text:p text:style-name="P5">Conflict flag’leri</text:p>
        </text:list-item>
        <text:list-item>
          <text:p text:style-name="P5">Visibility seviyeleri</text:p>
        </text:list-item>
        <text:list-item>
          <text:p text:style-name="P5">Sponsor ve owner atamaları</text:p>
        </text:list-item>
        <text:list-item>
          <text:p text:style-name="P5">Agreement ve compliance durumu</text:p>
        </text:list-item>
      </text:list>
      <text:h text:style-name="Heading_20_2" text:outline-level="2">Yapmaması gerekenler</text:h>
      <text:list xml:id="list72823108035968" text:continue-numbering="true" text:style-name="WWNum1">
        <text:list-item>
          <text:p text:style-name="P5">Gereksiz mikro yönetim yapmamalı</text:p>
        </text:list-item>
        <text:list-item>
          <text:p text:style-name="P5">Restricted notları ihtiyaç yoksa açmamalı</text:p>
        </text:list-item>
        <text:list-item>
          <text:p text:style-name="P5">Kayıt dışı karar vermemeli</text:p>
        </text:list-item>
      </text:list>
      <text:h text:style-name="Heading_20_2" text:outline-level="2">Örnek kullanım senaryosu – Aynı müşteriye iki partner gitmek istiyor</text:h>
      <text:list xml:id="list72823278138611" text:continue-list="list596741546" text:style-name="WWNum5">
        <text:list-item>
          <text:p text:style-name="P6">Conflict flagged opportunity governance ekranına düşer.</text:p>
        </text:list-item>
        <text:list-item>
          <text:p text:style-name="P6">Source owner ve protected window kontrol edilir.</text:p>
        </text:list-item>
        <text:list-item>
          <text:p text:style-name="P6">İki tarafın rolleri incelenir: source owner, technical fit, co-sell ihtiyacı.</text:p>
        </text:list-item>
        <text:list-item>
          <text:p text:style-name="P6">Tek owner mı yoksa ortak çalışma mı olacağına karar verilir.</text:p>
        </text:list-item>
        <text:list-item>
          <text:p text:style-name="P6">Visibility seviyesi güncellenir.</text:p>
        </text:list-item>
        <text:list-item>
          <text:p text:style-name="P6">Gerekirse sponsor veya co-sell etiketi eklenir.</text:p>
        </text:list-item>
        <text:list-item>
          <text:p text:style-name="P6">Karar not olarak kaydedilir.</text:p>
        </text:list-item>
      </text:list>
      <text:h text:style-name="Heading_20_1" text:outline-level="1"><text:soft-page-break/>6. Rol 2 – Partner Owner / Business Builder</text:h>
      <text:p text:style-name="Subtle">Kim için: Gökhan, Yasin, İbrahim, bazı durumlarda Muhittin ve Fetih</text:p>
      <text:h text:style-name="Heading_20_2" text:outline-level="2">Amaç</text:h>
      <text:p text:style-name="Standard">Kendi fırsatlarını, ürünlerini, ilişkilerini ve ticari akışını yönetmek.</text:p>
      <text:h text:style-name="Heading_20_2" text:outline-level="2">Temel sorumluluklar</text:h>
      <text:list text:continue-list="list72823108035968" text:style-name="WWNum1">
        <text:list-item>
          <text:p text:style-name="P5">Lead oluşturmak ve beslemek</text:p>
        </text:list-item>
        <text:list-item>
          <text:p text:style-name="P5">Opportunity açmak ve ilerletmek</text:p>
        </text:list-item>
        <text:list-item>
          <text:p text:style-name="P5">Kendi ürün veya servislerini sisteme eklemek</text:p>
        </text:list-item>
        <text:list-item>
          <text:p text:style-name="P5">Demo ve proposal talep etmek</text:p>
        </text:list-item>
        <text:list-item>
          <text:p text:style-name="P5">Gerekli partnerleri opportunity’ye çağırmak</text:p>
        </text:list-item>
      </text:list>
      <text:h text:style-name="Heading_20_2" text:outline-level="2">Kullandığı ana ekranlar</text:h>
      <text:list text:continue-numbering="true" text:style-name="WWNum1">
        <text:list-item>
          <text:p text:style-name="P5">My Dashboard</text:p>
        </text:list-item>
        <text:list-item>
          <text:p text:style-name="P5">My Leads</text:p>
        </text:list-item>
        <text:list-item>
          <text:p text:style-name="P5">My Opportunities</text:p>
        </text:list-item>
        <text:list-item>
          <text:p text:style-name="P5">My Accounts</text:p>
        </text:list-item>
        <text:list-item>
          <text:p text:style-name="P5">My Products</text:p>
        </text:list-item>
        <text:list-item>
          <text:p text:style-name="P5">Activities ve Documents</text:p>
        </text:list-item>
      </text:list>
      <text:h text:style-name="Heading_20_2" text:outline-level="2">Görebildiği ana veri</text:h>
      <text:list text:continue-numbering="true" text:style-name="WWNum1">
        <text:list-item>
          <text:p text:style-name="P5">Kendi kayıtları</text:p>
        </text:list-item>
        <text:list-item>
          <text:p text:style-name="P5">Paylaşılmış kayıtlar</text:p>
        </text:list-item>
        <text:list-item>
          <text:p text:style-name="P5">Birlikte çalıştığı opportunity’ler</text:p>
        </text:list-item>
        <text:list-item>
          <text:p text:style-name="P5">Kendi ürünleri ve ilişkileri</text:p>
        </text:list-item>
      </text:list>
      <text:h text:style-name="Heading_20_2" text:outline-level="2">Yapmaması gerekenler</text:h>
      <text:list xml:id="list72823141181718" text:continue-numbering="true" text:style-name="WWNum1">
        <text:list-item>
          <text:p text:style-name="P5">Owner olmayan müşteri üzerine habersiz gitmemeli</text:p>
        </text:list-item>
        <text:list-item>
          <text:p text:style-name="P5">Visibility kuralını ihlal etmemeli</text:p>
        </text:list-item>
        <text:list-item>
          <text:p text:style-name="P5">Sistem dışı side-deal yapmamalı</text:p>
        </text:list-item>
      </text:list>
      <text:h text:style-name="Heading_20_2" text:outline-level="2">Örnek kullanım senaryosu – Gökhan yeni bir fırsat getiriyor</text:h>
      <text:list xml:id="list72822203070222" text:continue-list="list72823278138611" text:style-name="WWNum5">
        <text:list-item>
          <text:p text:style-name="P6">Yeni lead oluşturur.</text:p>
        </text:list-item>
        <text:list-item>
          <text:p text:style-name="P6">Contact ve organization kaydını bağlar.</text:p>
        </text:list-item>
        <text:list-item>
          <text:p text:style-name="P6">Known by me ve source owner alanlarını doldurur.</text:p>
        </text:list-item>
        <text:list-item>
          <text:p text:style-name="P6">İhtiyaç tipi ve ülke / sektör bilgisi girilir.</text:p>
        </text:list-item>
        <text:list-item>
          <text:p text:style-name="P6">Visibility seviyesi örneğin Restricted seçilir.</text:p>
        </text:list-item>
        <text:list-item>
          <text:p text:style-name="P6">Teknik destek gerekiyorsa Erol sponsor/solution partner olarak eklenir.</text:p>
        </text:list-item>
        <text:list-item>
          <text:p text:style-name="P6">Lead opportunity’ye dönüştürülür.</text:p>
        </text:list-item>
        <text:list-item>
          <text:p text:style-name="P6">Demo veya proposal süreci başlatılır.</text:p>
        </text:list-item>
      </text:list>
      <text:h text:style-name="Heading_20_1" text:outline-level="1">7. Rol 3 – Solution Architect / Technical Partner</text:h>
      <text:p text:style-name="Subtle">Kim için: Erol; bazı durumlarda Gökhan veya teknik counterpart’lar</text:p>
      <text:h text:style-name="Heading_20_2" text:outline-level="2"><text:soft-page-break/>Amaç</text:h>
      <text:p text:style-name="Standard">Fırsatın teknik olarak yapılabilirliğini ve doğru çözüm eşleşmesini belirlemek.</text:p>
      <text:h text:style-name="Heading_20_2" text:outline-level="2">Temel sorumluluklar</text:h>
      <text:list text:continue-list="list72823141181718" text:style-name="WWNum1">
        <text:list-item>
          <text:p text:style-name="P5">Use case analizi</text:p>
        </text:list-item>
        <text:list-item>
          <text:p text:style-name="P5">Ürün / çözüm eşleşmesi yapmak</text:p>
        </text:list-item>
        <text:list-item>
          <text:p text:style-name="P5">Entegrasyon ihtiyacını çıkarmak</text:p>
        </text:list-item>
        <text:list-item>
          <text:p text:style-name="P5">Demo / PoC scope önermek</text:p>
        </text:list-item>
        <text:list-item>
          <text:p text:style-name="P5">Teknik risk ve blocker işaretlemek</text:p>
        </text:list-item>
        <text:list-item>
          <text:p text:style-name="P5">Implementation estimate vermek</text:p>
        </text:list-item>
      </text:list>
      <text:h text:style-name="Heading_20_2" text:outline-level="2">Kullandığı ana ekranlar</text:h>
      <text:list text:continue-numbering="true" text:style-name="WWNum1">
        <text:list-item>
          <text:p text:style-name="P5">Technical Dashboard</text:p>
        </text:list-item>
        <text:list-item>
          <text:p text:style-name="P5">Opportunities Needing Review</text:p>
        </text:list-item>
        <text:list-item>
          <text:p text:style-name="P5">Products &amp; Architectures</text:p>
        </text:list-item>
        <text:list-item>
          <text:p text:style-name="P5">Integration Map</text:p>
        </text:list-item>
        <text:list-item>
          <text:p text:style-name="P5">Demo Queue</text:p>
        </text:list-item>
        <text:list-item>
          <text:p text:style-name="P5">Delivery Risk Panel</text:p>
        </text:list-item>
      </text:list>
      <text:h text:style-name="Heading_20_2" text:outline-level="2">Görebildiği ana veri</text:h>
      <text:list text:continue-numbering="true" text:style-name="WWNum1">
        <text:list-item>
          <text:p text:style-name="P5">Teknik review bekleyen opportunity’ler</text:p>
        </text:list-item>
        <text:list-item>
          <text:p text:style-name="P5">İlgili product kayıtları</text:p>
        </text:list-item>
        <text:list-item>
          <text:p text:style-name="P5">Integration ve architecture notları</text:p>
        </text:list-item>
        <text:list-item>
          <text:p text:style-name="P5">Compliance flags</text:p>
        </text:list-item>
      </text:list>
      <text:h text:style-name="Heading_20_2" text:outline-level="2">Yapmaması gerekenler</text:h>
      <text:list xml:id="list72821763932173" text:continue-numbering="true" text:style-name="WWNum1">
        <text:list-item>
          <text:p text:style-name="P5">Tek başına ticari taahhüt vermemeli</text:p>
        </text:list-item>
        <text:list-item>
          <text:p text:style-name="P5">Scope onayı olmadan implementation sözü vermemeli</text:p>
        </text:list-item>
        <text:list-item>
          <text:p text:style-name="P5">İlgisi olmayan kayıtların detayına girmemeli</text:p>
        </text:list-item>
      </text:list>
      <text:h text:style-name="Heading_20_2" text:outline-level="2">Örnek kullanım senaryosu – Erol teknik review veriyor</text:h>
      <text:list xml:id="list72822386606270" text:continue-list="list72822203070222" text:style-name="WWNum5">
        <text:list-item>
          <text:p text:style-name="P6">Opportunity teknik review kuyruğuna düşer.</text:p>
        </text:list-item>
        <text:list-item>
          <text:p text:style-name="P6">Use case ve hedef sektör özeti okunur.</text:p>
        </text:list-item>
        <text:list-item>
          <text:p text:style-name="P6">Hangi sistemlerle entegrasyon gerektiği analiz edilir.</text:p>
        </text:list-item>
        <text:list-item>
          <text:p text:style-name="P6">Ürün eşleşmesi yapılır.</text:p>
        </text:list-item>
        <text:list-item>
          <text:p text:style-name="P6">Demo mu production setup mı gerektiği işaretlenir.</text:p>
        </text:list-item>
        <text:list-item>
          <text:p text:style-name="P6">Integration required ve compliance review needed flag’leri güncellenir.</text:p>
        </text:list-item>
        <text:list-item>
          <text:p text:style-name="P6">Tahmini delivery effort girilir.</text:p>
        </text:list-item>
        <text:list-item>
          <text:p text:style-name="P6">Partner owner’a teknik geri bildirim bırakılır.</text:p>
        </text:list-item>
      </text:list>
      <text:h text:style-name="Heading_20_1" text:outline-level="1">8. Rol 4 – Channel / Referral Partner</text:h>
      <text:p text:style-name="Subtle">Kim için: Dış satış bağlantıları, bölgesel referral kişiler, sınırlı erişimli partnerler</text:p>
      <text:h text:style-name="Heading_20_2" text:outline-level="2">Amaç</text:h>
      <text:p text:style-name="Standard">Lead getirmek ve sınırlı ticari akış içinde fırsatı yönlendirmek.</text:p>
      <text:h text:style-name="Heading_20_2" text:outline-level="2"><text:soft-page-break/>Temel sorumluluklar</text:h>
      <text:list text:continue-list="list72821763932173" text:style-name="WWNum1">
        <text:list-item>
          <text:p text:style-name="P5">Lead submit etmek</text:p>
        </text:list-item>
        <text:list-item>
          <text:p text:style-name="P5">İlk qualification bilgisini girmek</text:p>
        </text:list-item>
        <text:list-item>
          <text:p text:style-name="P5">Intro yapmak</text:p>
        </text:list-item>
        <text:list-item>
          <text:p text:style-name="P5">Ek bilgi sağlamak</text:p>
        </text:list-item>
        <text:list-item>
          <text:p text:style-name="P5">Kendi referral’larının durumunu takip etmek</text:p>
        </text:list-item>
      </text:list>
      <text:h text:style-name="Heading_20_2" text:outline-level="2">Kullandığı ana ekranlar</text:h>
      <text:list text:continue-numbering="true" text:style-name="WWNum1">
        <text:list-item>
          <text:p text:style-name="P5">My Referrals</text:p>
        </text:list-item>
        <text:list-item>
          <text:p text:style-name="P5">Lead Submit Form</text:p>
        </text:list-item>
        <text:list-item>
          <text:p text:style-name="P5">Status Tracker</text:p>
        </text:list-item>
        <text:list-item>
          <text:p text:style-name="P5">Payout Summary</text:p>
        </text:list-item>
      </text:list>
      <text:h text:style-name="Heading_20_2" text:outline-level="2">Görebildiği ana veri</text:h>
      <text:list text:continue-numbering="true" text:style-name="WWNum1">
        <text:list-item>
          <text:p text:style-name="P5">Kendi gönderdiği lead’ler</text:p>
        </text:list-item>
        <text:list-item>
          <text:p text:style-name="P5">Kabul / red / aktif referral durumu</text:p>
        </text:list-item>
        <text:list-item>
          <text:p text:style-name="P5">Sınırlı stage özeti</text:p>
        </text:list-item>
        <text:list-item>
          <text:p text:style-name="P5">Tahmini payout özeti</text:p>
        </text:list-item>
      </text:list>
      <text:h text:style-name="Heading_20_2" text:outline-level="2">Yapmaması gerekenler</text:h>
      <text:list xml:id="list72823376995251" text:continue-numbering="true" text:style-name="WWNum1">
        <text:list-item>
          <text:p text:style-name="P5">Tam CRM görünürlüğü beklememeli</text:p>
        </text:list-item>
        <text:list-item>
          <text:p text:style-name="P5">Satışı kendi yönetiyormuş gibi davranmamalı</text:p>
        </text:list-item>
        <text:list-item>
          <text:p text:style-name="P5">Referral kaydını sistem dışına taşımamalı</text:p>
        </text:list-item>
      </text:list>
      <text:h text:style-name="Heading_20_2" text:outline-level="2">Örnek kullanım senaryosu – Dış partner Türkiye’den lead getiriyor</text:h>
      <text:list xml:id="list72822552750791" text:continue-list="list72822386606270" text:style-name="WWNum5">
        <text:list-item>
          <text:p text:style-name="P6">Referral partner lead submit eder.</text:p>
        </text:list-item>
        <text:list-item>
          <text:p text:style-name="P6">İlişki gücü ve intro tipi girilir.</text:p>
        </text:list-item>
        <text:list-item>
          <text:p text:style-name="P6">Lead governance veya partner owner tarafından incelenir.</text:p>
        </text:list-item>
        <text:list-item>
          <text:p text:style-name="P6">Kabul edilirse source owner atanır.</text:p>
        </text:list-item>
        <text:list-item>
          <text:p text:style-name="P6">Status tracker ekranından ilerleme özeti görünür.</text:p>
        </text:list-item>
        <text:list-item>
          <text:p text:style-name="P6">Deal kapanırsa payout kaydı tetiklenir.</text:p>
        </text:list-item>
      </text:list>
      <text:h text:style-name="Heading_20_1" text:outline-level="1">9. Rol 5 – Delivery Manager / PMO</text:h>
      <text:p text:style-name="Subtle">Kim için: Muhittin; bazı projelerde Erol veya delivery koordinasyonundaki kişiler</text:p>
      <text:h text:style-name="Heading_20_2" text:outline-level="2">Amaç</text:h>
      <text:p text:style-name="Standard">Kazanan opportunity’yi proje ve teslimat akışına çevirmek.</text:p>
      <text:h text:style-name="Heading_20_2" text:outline-level="2">Temel sorumluluklar</text:h>
      <text:list text:continue-list="list72823376995251" text:style-name="WWNum1">
        <text:list-item>
          <text:p text:style-name="P5">Project kaydı açmak</text:p>
        </text:list-item>
        <text:list-item>
          <text:p text:style-name="P5">Milestone planlamak</text:p>
        </text:list-item>
        <text:list-item>
          <text:p text:style-name="P5">Sorumluları atamak</text:p>
        </text:list-item>
        <text:list-item>
          <text:p text:style-name="P5">Scope ve change request takibi</text:p>
        </text:list-item>
        <text:list-item>
          <text:p text:style-name="P5">Blocker ve gecikme yönetimi</text:p>
        </text:list-item>
        <text:list-item>
          <text:p text:style-name="P5">Acceptance ve handoff süreci</text:p>
        </text:list-item>
      </text:list>
      <text:h text:style-name="Heading_20_2" text:outline-level="2"><text:soft-page-break/>Kullandığı ana ekranlar</text:h>
      <text:list text:continue-numbering="true" text:style-name="WWNum1">
        <text:list-item>
          <text:p text:style-name="P5">Delivery Dashboard</text:p>
        </text:list-item>
        <text:list-item>
          <text:p text:style-name="P5">Projects</text:p>
        </text:list-item>
        <text:list-item>
          <text:p text:style-name="P5">Milestones</text:p>
        </text:list-item>
        <text:list-item>
          <text:p text:style-name="P5">Resource View</text:p>
        </text:list-item>
        <text:list-item>
          <text:p text:style-name="P5">SOW / Agreement Tracker</text:p>
        </text:list-item>
        <text:list-item>
          <text:p text:style-name="P5">Delivery Risks</text:p>
        </text:list-item>
      </text:list>
      <text:h text:style-name="Heading_20_2" text:outline-level="2">Görebildiği ana veri</text:h>
      <text:list text:continue-numbering="true" text:style-name="WWNum1">
        <text:list-item>
          <text:p text:style-name="P5">Delivery’ye geçmiş işler</text:p>
        </text:list-item>
        <text:list-item>
          <text:p text:style-name="P5">Milestone’lar</text:p>
        </text:list-item>
        <text:list-item>
          <text:p text:style-name="P5">Scope, owner ve dependency alanları</text:p>
        </text:list-item>
        <text:list-item>
          <text:p text:style-name="P5">SOW ve support window bilgisi</text:p>
        </text:list-item>
      </text:list>
      <text:h text:style-name="Heading_20_2" text:outline-level="2">Yapmaması gerekenler</text:h>
      <text:list xml:id="list72821551568740" text:continue-numbering="true" text:style-name="WWNum1">
        <text:list-item>
          <text:p text:style-name="P5">Commercial ownership ile delivery ownership’i karıştırmamalı</text:p>
        </text:list-item>
        <text:list-item>
          <text:p text:style-name="P5">SOW olmadan büyük commitment vermemeli</text:p>
        </text:list-item>
        <text:list-item>
          <text:p text:style-name="P5">İlgisiz partner verilerine girmemeli</text:p>
        </text:list-item>
      </text:list>
      <text:h text:style-name="Heading_20_2" text:outline-level="2">Örnek kullanım senaryosu – Closed Won sonrası proje açılıyor</text:h>
      <text:list xml:id="list72823339582530" text:continue-list="list72822552750791" text:style-name="WWNum5">
        <text:list-item>
          <text:p text:style-name="P6">Opportunity Closed Won durumuna gelir.</text:p>
        </text:list-item>
        <text:list-item>
          <text:p text:style-name="P6">Sistem project creation akışı başlatır.</text:p>
        </text:list-item>
        <text:list-item>
          <text:p text:style-name="P6">Project owner, delivery lead ve technical lead atanır.</text:p>
        </text:list-item>
        <text:list-item>
          <text:p text:style-name="P6">SOW linklenir.</text:p>
        </text:list-item>
        <text:list-item>
          <text:p text:style-name="P6">Milestone planı girilir.</text:p>
        </text:list-item>
        <text:list-item>
          <text:p text:style-name="P6">Risk ve dependency notları eklenir.</text:p>
        </text:list-item>
        <text:list-item>
          <text:p text:style-name="P6">Handover sonrası support period tanımlanır.</text:p>
        </text:list-item>
      </text:list>
      <text:h text:style-name="Heading_20_1" text:outline-level="1">10. Rol 6 – Restricted External / Advisor</text:h>
      <text:p text:style-name="Subtle">Kim için: Danışmanlar, sınırlı dış uzmanlar, review verecek kişiler</text:p>
      <text:h text:style-name="Heading_20_2" text:outline-level="2">Amaç</text:h>
      <text:p text:style-name="Standard">Sadece kendisiyle paylaşılan kayıtlar üzerinde sınırlı katkı vermek.</text:p>
      <text:h text:style-name="Heading_20_2" text:outline-level="2">Temel sorumluluklar</text:h>
      <text:list text:continue-list="list72821551568740" text:style-name="WWNum1">
        <text:list-item>
          <text:p text:style-name="P5">Review yapmak</text:p>
        </text:list-item>
        <text:list-item>
          <text:p text:style-name="P5">Yorum ve öneri bırakmak</text:p>
        </text:list-item>
        <text:list-item>
          <text:p text:style-name="P5">Belirli doküman ve özetleri incelemek</text:p>
        </text:list-item>
        <text:list-item>
          <text:p text:style-name="P5">Advisory katkı sunmak</text:p>
        </text:list-item>
      </text:list>
      <text:h text:style-name="Heading_20_2" text:outline-level="2">Kullandığı ana ekranlar</text:h>
      <text:list text:continue-numbering="true" text:style-name="WWNum1">
        <text:list-item>
          <text:p text:style-name="P5">Shared Items</text:p>
        </text:list-item>
        <text:list-item>
          <text:p text:style-name="P5">Advisory Requests</text:p>
        </text:list-item>
        <text:list-item>
          <text:p text:style-name="P5">Meeting Notes</text:p>
        </text:list-item>
        <text:list-item>
          <text:p text:style-name="P5">Limited Docs View</text:p>
        </text:list-item>
      </text:list>
      <text:h text:style-name="Heading_20_2" text:outline-level="2"><text:soft-page-break/>Görebildiği ana veri</text:h>
      <text:list text:continue-numbering="true" text:style-name="WWNum1">
        <text:list-item>
          <text:p text:style-name="P5">Sadece kendisiyle paylaşılan özet kayıtlar</text:p>
        </text:list-item>
        <text:list-item>
          <text:p text:style-name="P5">İlgili advisory notları</text:p>
        </text:list-item>
        <text:list-item>
          <text:p text:style-name="P5">Sınırlı dokümanlar</text:p>
        </text:list-item>
      </text:list>
      <text:h text:style-name="Heading_20_2" text:outline-level="2">Yapmaması gerekenler</text:h>
      <text:list xml:id="list72821528772017" text:continue-numbering="true" text:style-name="WWNum1">
        <text:list-item>
          <text:p text:style-name="P5">Tam partner gibi davranmamalı</text:p>
        </text:list-item>
        <text:list-item>
          <text:p text:style-name="P5">Paylaşılmayan bilgiye erişim talep etmemeli</text:p>
        </text:list-item>
        <text:list-item>
          <text:p text:style-name="P5">Kendi başına implied partnership varsaymamalı</text:p>
        </text:list-item>
      </text:list>
      <text:h text:style-name="Heading_20_2" text:outline-level="2">Örnek kullanım senaryosu – Dış advisor ürün yorumu veriyor</text:h>
      <text:list text:continue-list="list72823339582530" text:style-name="WWNum5">
        <text:list-item>
          <text:p text:style-name="P6">Governance kullanıcı advisor’a product summary paylaşır.</text:p>
        </text:list-item>
        <text:list-item>
          <text:p text:style-name="P6">Advisor sadece ilgili özet ve gerekli belgeleri görür.</text:p>
        </text:list-item>
        <text:list-item>
          <text:p text:style-name="P6">Review note veya recommendation bırakır.</text:p>
        </text:list-item>
        <text:list-item>
          <text:p text:style-name="P6">Owner ekip bu girdiyi değerlendirir.</text:p>
        </text:list-item>
      </text:list>
      <text:h text:style-name="Heading_20_1" text:outline-level="1">11. Ortak sistem akışları</text:h>
      <text:h text:style-name="Heading_20_2" text:outline-level="2">11.1 Yeni ilişki / contact kaydı</text:h>
      <text:list text:continue-numbering="true" text:style-name="WWNum5">
        <text:list-item>
          <text:p text:style-name="P6">Yeni contact oluşturulur.</text:p>
        </text:list-item>
        <text:list-item>
          <text:p text:style-name="P6">Organization varsa bağlanır.</text:p>
        </text:list-item>
        <text:list-item>
          <text:p text:style-name="P6">Known by ve trust level alanı doldurulur.</text:p>
        </text:list-item>
        <text:list-item>
          <text:p text:style-name="P6">Visibility seviyesi seçilir.</text:p>
        </text:list-item>
        <text:list-item>
          <text:p text:style-name="P6">Gerekirse restricted olarak işaretlenir.</text:p>
        </text:list-item>
        <text:list-item>
          <text:p text:style-name="P6">İlk not eklenir.</text:p>
        </text:list-item>
      </text:list>
      <text:h text:style-name="Heading_20_2" text:outline-level="2">11.2 Lead oluşturma</text:h>
      <text:list text:continue-numbering="true" text:style-name="WWNum5">
        <text:list-item>
          <text:p text:style-name="P6">Lead başlığı girilir.</text:p>
        </text:list-item>
        <text:list-item>
          <text:p text:style-name="P6">Source owner atanır.</text:p>
        </text:list-item>
        <text:list-item>
          <text:p text:style-name="P6">İhtiyaç tipi ve ülke / sektör bilgisi girilir.</text:p>
        </text:list-item>
        <text:list-item>
          <text:p text:style-name="P6">Contact ve organization ilişkilendirilir.</text:p>
        </text:list-item>
        <text:list-item>
          <text:p text:style-name="P6">Visibility seçilir.</text:p>
        </text:list-item>
        <text:list-item>
          <text:p text:style-name="P6">Sponsor gerekiyorsa atanır.</text:p>
        </text:list-item>
      </text:list>
      <text:h text:style-name="Heading_20_2" text:outline-level="2">11.3 Lead’den opportunity’ye geçiş</text:h>
      <text:list text:continue-numbering="true" text:style-name="WWNum5">
        <text:list-item>
          <text:p text:style-name="P6">Qualification tamamlanır.</text:p>
        </text:list-item>
        <text:list-item>
          <text:p text:style-name="P6">Opportunity açılır.</text:p>
        </text:list-item>
        <text:list-item>
          <text:p text:style-name="P6">Deal path seçilir: referral / co-sell / reseller / implementation / advisory.</text:p>
        </text:list-item>
        <text:list-item>
          <text:p text:style-name="P6">Product veya solution eşleştirilir.</text:p>
        </text:list-item>
        <text:list-item>
          <text:p text:style-name="P6">Technical review istenir.</text:p>
        </text:list-item>
        <text:list-item>
          <text:p text:style-name="P6">Proposal veya demo akışı başlatılır.</text:p>
        </text:list-item>
      </text:list>
      <text:h text:style-name="Heading_20_2" text:outline-level="2">11.4 Opportunity governance review</text:h>
      <text:list text:continue-numbering="true" text:style-name="WWNum5">
        <text:list-item>
          <text:p text:style-name="P6">Source owner doğrulanır.</text:p>
        </text:list-item>
        <text:list-item>
          <text:p text:style-name="P6">Conflict flag kontrol edilir.</text:p>
        </text:list-item>
        <text:list-item>
          <text:p text:style-name="P6">Visibility kuralı kontrol edilir.</text:p>
        </text:list-item>
        <text:list-item>
          <text:p text:style-name="P6"><text:soft-page-break/>Sponsor netleştirilir.</text:p>
        </text:list-item>
        <text:list-item>
          <text:p text:style-name="P6">Billing entity not edilir.</text:p>
        </text:list-item>
        <text:list-item>
          <text:p text:style-name="P6">Revenue share için ilk çerçeve kaydedilir.</text:p>
        </text:list-item>
      </text:list>
      <text:h text:style-name="Heading_20_2" text:outline-level="2">11.5 Opportunity won → project</text:h>
      <text:list text:continue-numbering="true" text:style-name="WWNum5">
        <text:list-item>
          <text:p text:style-name="P6">Opportunity Closed Won olur.</text:p>
        </text:list-item>
        <text:list-item>
          <text:p text:style-name="P6">Project kaydı açılır.</text:p>
        </text:list-item>
        <text:list-item>
          <text:p text:style-name="P6">SOW ve ilgili agreement’lar bağlanır.</text:p>
        </text:list-item>
        <text:list-item>
          <text:p text:style-name="P6">Milestone’lar girilir.</text:p>
        </text:list-item>
        <text:list-item>
          <text:p text:style-name="P6">Delivery owner ve technical lead atanır.</text:p>
        </text:list-item>
        <text:list-item>
          <text:p text:style-name="P6">Support / handoff periyodu tanımlanır.</text:p>
        </text:list-item>
      </text:list>
      <text:h text:style-name="Heading_20_1" text:outline-level="1">12. Rol bazlı kritik uyarılar</text:h>
      <text:h text:style-name="Heading_20_2" text:outline-level="2">Founding / Governance</text:h>
      <text:list text:continue-list="list72821528772017" text:style-name="WWNum1">
        <text:list-item>
          <text:p text:style-name="P5">Kayıt dışı karar vermemeli.</text:p>
        </text:list-item>
        <text:list-item>
          <text:p text:style-name="P5">Her işi mikro yönetmemeli.</text:p>
        </text:list-item>
      </text:list>
      <text:h text:style-name="Heading_20_2" text:outline-level="2">Partner Owner</text:h>
      <text:list text:continue-numbering="true" text:style-name="WWNum1">
        <text:list-item>
          <text:p text:style-name="P5">Owner olmayan müşteri üzerine habersiz gitmemeli.</text:p>
        </text:list-item>
        <text:list-item>
          <text:p text:style-name="P5">Restricted kaydı izinsiz açmamalı.</text:p>
        </text:list-item>
      </text:list>
      <text:h text:style-name="Heading_20_2" text:outline-level="2">Technical Partner</text:h>
      <text:list text:continue-numbering="true" text:style-name="WWNum1">
        <text:list-item>
          <text:p text:style-name="P5">Teknik review olmadan delivery sözü vermemeli.</text:p>
        </text:list-item>
        <text:list-item>
          <text:p text:style-name="P5">Commercial term belirlememeli.</text:p>
        </text:list-item>
      </text:list>
      <text:h text:style-name="Heading_20_2" text:outline-level="2">Referral Partner</text:h>
      <text:list text:continue-numbering="true" text:style-name="WWNum1">
        <text:list-item>
          <text:p text:style-name="P5">Tam satış sahibi gibi davranmamalı.</text:p>
        </text:list-item>
        <text:list-item>
          <text:p text:style-name="P5">Alliance dışı yan iş yaratmamalı.</text:p>
        </text:list-item>
      </text:list>
      <text:h text:style-name="Heading_20_2" text:outline-level="2">Delivery Manager</text:h>
      <text:list text:continue-numbering="true" text:style-name="WWNum1">
        <text:list-item>
          <text:p text:style-name="P5">SOW olmadan büyük teslimat commitment’i vermemeli.</text:p>
        </text:list-item>
        <text:list-item>
          <text:p text:style-name="P5">Commercial ownership ile delivery’yi karıştırmamalı.</text:p>
        </text:list-item>
      </text:list>
      <text:h text:style-name="Heading_20_2" text:outline-level="2">Advisor</text:h>
      <text:list text:continue-numbering="true" text:style-name="WWNum1">
        <text:list-item>
          <text:p text:style-name="P5">Paylaşılmayan bilgiyi talep etmemeli.</text:p>
        </text:list-item>
        <text:list-item>
          <text:p text:style-name="P5">Core partner gibi davranmamalı.</text:p>
        </text:list-item>
      </text:list>
      <text:h text:style-name="Heading_20_1" text:outline-level="1">13. Ekran kullanım matris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3">Ekran</text:span></text:p>
          </table:table-cell>
          <table:table-cell table:style-name="Table3.A1" office:value-type="string">
            <text:p text:style-name="P7"><text:span text:style-name="T3">Governance</text:span></text:p>
          </table:table-cell>
          <table:table-cell table:style-name="Table3.A1" office:value-type="string">
            <text:p text:style-name="P7"><text:span text:style-name="T3">Partner Owner</text:span></text:p>
          </table:table-cell>
          <table:table-cell table:style-name="Table3.A1" office:value-type="string">
            <text:p text:style-name="P7"><text:span text:style-name="T3">Technical</text:span></text:p>
          </table:table-cell>
          <table:table-cell table:style-name="Table3.A1" office:value-type="string">
            <text:p text:style-name="P7"><text:span text:style-name="T3">Referral</text:span></text:p>
          </table:table-cell>
          <table:table-cell table:style-name="Table3.A1" office:value-type="string">
            <text:p text:style-name="P7"><text:span text:style-name="T3">PMO</text:span></text:p>
          </table:table-cell>
          <table:table-cell table:style-name="Table3.A1" office:value-type="string">
            <text:p text:style-name="P7"><text:span text:style-name="T3">Restricted</text:span></text:p>
          </table:table-cell>
        </table:table-row>
        <table:table-row table:style-name="Table3.1">
          <table:table-cell table:style-name="Table3.A2" office:value-type="string">
            <text:p text:style-name="P7">Governance Dashboard</text:p>
          </table:table-cell>
          <table:table-cell table:style-name="Table3.B2" office:value-type="string">
            <text:p text:style-name="P7">Tam</text:p>
          </table:table-cell>
          <table:table-cell table:style-name="Table3.C2" office:value-type="string">
            <text:p text:style-name="P7">Yok</text:p>
          </table:table-cell>
          <table:table-cell table:style-name="Table3.D2" office:value-type="string">
            <text:p text:style-name="P7">Özet</text:p>
          </table:table-cell>
          <table:table-cell table:style-name="Table3.E2" office:value-type="string">
            <text:p text:style-name="P7">Yok</text:p>
          </table:table-cell>
          <table:table-cell table:style-name="Table3.F2" office:value-type="string">
            <text:p text:style-name="P7">Özet</text:p>
          </table:table-cell>
          <table:table-cell table:style-name="Table3.G2" office:value-type="string">
            <text:p text:style-name="P7">Yok</text:p>
          </table:table-cell>
        </table:table-row>
        <table:table-row table:style-name="Table3.1">
          <table:table-cell table:style-name="Table3.A3" office:value-type="string">
            <text:p text:style-name="P7">My <text:soft-page-break/>Dashboard</text:p>
          </table:table-cell>
          <table:table-cell table:style-name="Table3.B3" office:value-type="string">
            <text:p text:style-name="P7">Opsiyonel</text:p>
          </table:table-cell>
          <table:table-cell table:style-name="Table3.C3" office:value-type="string">
            <text:p text:style-name="P7">Tam</text:p>
          </table:table-cell>
          <table:table-cell table:style-name="Table3.D3" office:value-type="string">
            <text:p text:style-name="P7">Tam</text:p>
          </table:table-cell>
          <table:table-cell table:style-name="Table3.E3" office:value-type="string">
            <text:p text:style-name="P7">Tam</text:p>
          </table:table-cell>
          <table:table-cell table:style-name="Table3.F3" office:value-type="string">
            <text:p text:style-name="P7">Tam</text:p>
          </table:table-cell>
          <table:table-cell table:style-name="Table3.G3" office:value-type="string">
            <text:p text:style-name="P7">Sınırlı</text:p>
          </table:table-cell>
        </table:table-row>
        <table:table-row table:style-name="Table3.1">
          <table:table-cell table:style-name="Table3.A4" office:value-type="string">
            <text:p text:style-name="P7">All Opportunities</text:p>
          </table:table-cell>
          <table:table-cell table:style-name="Table3.B4" office:value-type="string">
            <text:p text:style-name="P7">Tam</text:p>
          </table:table-cell>
          <table:table-cell table:style-name="Table3.C4" office:value-type="string">
            <text:p text:style-name="P7">Sınırlı</text:p>
          </table:table-cell>
          <table:table-cell table:style-name="Table3.D4" office:value-type="string">
            <text:p text:style-name="P7">Görevli olduğu kadar</text:p>
          </table:table-cell>
          <table:table-cell table:style-name="Table3.E4" office:value-type="string">
            <text:p text:style-name="P7">Yok</text:p>
          </table:table-cell>
          <table:table-cell table:style-name="Table3.F4" office:value-type="string">
            <text:p text:style-name="P7">Delivery’dekiler</text:p>
          </table:table-cell>
          <table:table-cell table:style-name="Table3.G4" office:value-type="string">
            <text:p text:style-name="P7">Yok</text:p>
          </table:table-cell>
        </table:table-row>
        <table:table-row table:style-name="Table3.1">
          <table:table-cell table:style-name="Table3.A5" office:value-type="string">
            <text:p text:style-name="P7">Conflict Queue</text:p>
          </table:table-cell>
          <table:table-cell table:style-name="Table3.B5" office:value-type="string">
            <text:p text:style-name="P7">Tam</text:p>
          </table:table-cell>
          <table:table-cell table:style-name="Table3.C5" office:value-type="string">
            <text:p text:style-name="P7">Özet</text:p>
          </table:table-cell>
          <table:table-cell table:style-name="Table3.D5" office:value-type="string">
            <text:p text:style-name="P7">Özet</text:p>
          </table:table-cell>
          <table:table-cell table:style-name="Table3.E5" office:value-type="string">
            <text:p text:style-name="P7">Yok</text:p>
          </table:table-cell>
          <table:table-cell table:style-name="Table3.F5" office:value-type="string">
            <text:p text:style-name="P7">Özet</text:p>
          </table:table-cell>
          <table:table-cell table:style-name="Table3.G5" office:value-type="string">
            <text:p text:style-name="P7">Yok</text:p>
          </table:table-cell>
        </table:table-row>
        <table:table-row table:style-name="Table3.1">
          <table:table-cell table:style-name="Table3.A6" office:value-type="string">
            <text:p text:style-name="P7">Products &amp; Capabilities</text:p>
          </table:table-cell>
          <table:table-cell table:style-name="Table3.B6" office:value-type="string">
            <text:p text:style-name="P7">Tam</text:p>
          </table:table-cell>
          <table:table-cell table:style-name="Table3.C6" office:value-type="string">
            <text:p text:style-name="P7">Kendi + paylaşılan</text:p>
          </table:table-cell>
          <table:table-cell table:style-name="Table3.D6" office:value-type="string">
            <text:p text:style-name="P7">Tam</text:p>
          </table:table-cell>
          <table:table-cell table:style-name="Table3.E6" office:value-type="string">
            <text:p text:style-name="P7">Özet</text:p>
          </table:table-cell>
          <table:table-cell table:style-name="Table3.F6" office:value-type="string">
            <text:p text:style-name="P7">İlgili olanlar</text:p>
          </table:table-cell>
          <table:table-cell table:style-name="Table3.G6" office:value-type="string">
            <text:p text:style-name="P7">Paylaşılan kadar</text:p>
          </table:table-cell>
        </table:table-row>
        <table:table-row table:style-name="Table3.1">
          <table:table-cell table:style-name="Table3.A7" office:value-type="string">
            <text:p text:style-name="P7">Projects / Milestones</text:p>
          </table:table-cell>
          <table:table-cell table:style-name="Table3.B7" office:value-type="string">
            <text:p text:style-name="P7">Özet</text:p>
          </table:table-cell>
          <table:table-cell table:style-name="Table3.C7" office:value-type="string">
            <text:p text:style-name="P7">İlgili olanlar</text:p>
          </table:table-cell>
          <table:table-cell table:style-name="Table3.D7" office:value-type="string">
            <text:p text:style-name="P7">İlgili olanlar</text:p>
          </table:table-cell>
          <table:table-cell table:style-name="Table3.E7" office:value-type="string">
            <text:p text:style-name="P7">Yok</text:p>
          </table:table-cell>
          <table:table-cell table:style-name="Table3.F7" office:value-type="string">
            <text:p text:style-name="P7">Tam</text:p>
          </table:table-cell>
          <table:table-cell table:style-name="Table3.G7" office:value-type="string">
            <text:p text:style-name="P7">Yok</text:p>
          </table:table-cell>
        </table:table-row>
        <table:table-row table:style-name="Table3.1">
          <table:table-cell table:style-name="Table3.A8" office:value-type="string">
            <text:p text:style-name="P7">Agreements Registry</text:p>
          </table:table-cell>
          <table:table-cell table:style-name="Table3.B8" office:value-type="string">
            <text:p text:style-name="P7">Tam</text:p>
          </table:table-cell>
          <table:table-cell table:style-name="Table3.C8" office:value-type="string">
            <text:p text:style-name="P7">İlgili olanlar</text:p>
          </table:table-cell>
          <table:table-cell table:style-name="Table3.D8" office:value-type="string">
            <text:p text:style-name="P7">İlgili olanlar</text:p>
          </table:table-cell>
          <table:table-cell table:style-name="Table3.E8" office:value-type="string">
            <text:p text:style-name="P7">Yok</text:p>
          </table:table-cell>
          <table:table-cell table:style-name="Table3.F8" office:value-type="string">
            <text:p text:style-name="P7">İlgili olanlar</text:p>
          </table:table-cell>
          <table:table-cell table:style-name="Table3.G8" office:value-type="string">
            <text:p text:style-name="P7">Paylaşılan kadar</text:p>
          </table:table-cell>
        </table:table-row>
      </table:table>
      <text:h text:style-name="Heading_20_1" text:outline-level="1">14. Sonuç</text:h>
      <text:p text:style-name="Standard">Bu MVP ürünün başarısı, herkese aynı ekranı vermekten değil, doğru role doğru karar ekranını vermekten geçer.</text:p>
      <text:p text:style-name="Standard">Sistem içinde kişi ünvanı kadar, hatta ondan daha fazla, fırsat ve proje bazlı rol önemlidir.</text:p>
      <text:p text:style-name="Standard">Her opportunity’de şu alanların görünür olması önerilir: source owner, sponsor, deal owner, technical partner, product owner, delivery owner, visibility level, deal path.</text:p>
      <text:p text:style-name="Standard">Bu kılavuzun amacı rolleri dondurmak değil; MVP kullanımını tutarlı hale getirmekti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39in" fo:margin-bottom="0.0555in" style:contextual-spacing="false" fo:keep-together="always" fo:keep-with-next="always"/>
      <style:text-properties fo:color="#1f2937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.0555in" style:contextual-spacing="false" fo:keep-together="always" fo:keep-with-next="always"/>
      <style:text-properties fo:color="#1e40af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.0555in" style:contextual-spacing="false" fo:keep-together="always" fo:keep-with-next="always"/>
      <style:text-properties fo:color="#374151" loext:opacity="100%" style:font-name="Calibri" fo:font-family="Calibri" style:font-family-generic="roman" style:font-pitch="variable" fo:font-size="11.5pt" fo:font-weight="bold" style:font-name-asian="ＭＳ ゴシック" style:font-family-asian="'ＭＳ ゴシック'" style:font-family-generic-asian="system" style:font-pitch-asian="variable" style:font-size-asian="11.5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itleAccent" style:family="paragraph" style:parent-style-name="Title">
      <style:text-properties fo:color="#1d4ed8" loext:opacity="100%" style:font-name="Arial" fo:font-family="Arial" style:font-family-generic="roman" style:font-pitch="variable" fo:font-size="24pt" fo:font-weight="bold" style:font-size-asian="24pt" style:font-weight-asian="bold"/>
    </style:style>
    <style:style style:name="Subtle" style:family="paragraph" style:parent-style-name="Standard">
      <style:text-properties fo:color="#64748b" loext:opacity="100%" style:font-name="Arial" fo:font-family="Arial" style:font-family-generic="roman" style:font-pitch="variable" fo:font-size="10pt" fo:font-style="italic" style:font-size-asian="10pt" style:font-style-asian="italic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083in" fo:margin-bottom="0.7083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4.2$MacOSX_AARCH64 LibreOffice_project/290daaa01b999472f0c7a3890eb6a550fd74c6df</meta:generator>
    <meta:document-statistic meta:table-count="3" meta:image-count="0" meta:object-count="0" meta:page-count="10" meta:paragraph-count="371" meta:word-count="1778" meta:character-count="12007" meta:non-whitespace-character-count="10782"/>
    <meta:user-defined meta:name="AppVersion">14.0000</meta:user-defined>
    <meta:template xlink:type="simple" xlink:actuate="onRequest" xlink:title="Normal.dotm" xlink:href=""/>
  </office:meta>
</office:document-meta>
</file>